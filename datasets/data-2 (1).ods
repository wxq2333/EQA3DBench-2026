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等线" svg:font-family="等线" style:font-family-generic="swiss"/>
  </office:font-face-decls>
  <office:automatic-styles>
    <style:style style:name="co1" style:family="table-column">
      <style:table-column-properties fo:break-before="auto" style:column-width="5.341cm"/>
    </style:style>
    <style:style style:name="co2" style:family="table-column">
      <style:table-column-properties fo:break-before="auto" style:column-width="10.5cm"/>
    </style:style>
    <style:style style:name="co3" style:family="table-column">
      <style:table-column-properties fo:break-before="auto" style:column-width="1.819cm"/>
    </style:style>
    <style:style style:name="co4" style:family="table-column">
      <style:table-column-properties fo:break-before="auto" style:column-width="5.507cm"/>
    </style:style>
    <style:style style:name="co5" style:family="table-column">
      <style:table-column-properties fo:break-before="auto" style:column-width="4.433cm"/>
    </style:style>
    <style:style style:name="co6" style:family="table-column">
      <style:table-column-properties fo:break-before="auto" style:column-width="2.713cm"/>
    </style:style>
    <style:style style:name="co7" style:family="table-column">
      <style:table-column-properties fo:break-before="auto" style:column-width="7.128cm"/>
    </style:style>
    <style:style style:name="ro1" style:family="table-row">
      <style:table-row-properties style:row-height="0.487cm" fo:break-before="auto" style:use-optimal-row-height="true"/>
    </style:style>
    <style:style style:name="ro2" style:family="table-row">
      <style:table-row-properties style:row-height="0.605cm" fo:break-before="auto" style:use-optimal-row-height="true"/>
    </style:style>
    <style:style style:name="ro3" style:family="table-row">
      <style:table-row-properties style:row-height="10.557cm" fo:break-before="auto" style:use-optimal-row-height="true"/>
    </style:style>
    <style:style style:name="ro4" style:family="table-row">
      <style:table-row-properties style:row-height="6.271cm" fo:break-before="auto" style:use-optimal-row-height="false"/>
    </style:style>
    <style:style style:name="ro5" style:family="table-row">
      <style:table-row-properties style:row-height="9.451cm" fo:break-before="auto" style:use-optimal-row-height="true"/>
    </style:style>
    <style:style style:name="ro6" style:family="table-row">
      <style:table-row-properties style:row-height="4.475cm" fo:break-before="auto" style:use-optimal-row-height="true"/>
    </style:style>
    <style:style style:name="ro7" style:family="table-row">
      <style:table-row-properties style:row-height="6.376cm" fo:break-before="auto" style:use-optimal-row-height="false"/>
    </style:style>
    <style:style style:name="ro8" style:family="table-row">
      <style:table-row-properties style:row-height="10.003cm" fo:break-before="auto" style:use-optimal-row-height="true"/>
    </style:style>
    <style:style style:name="ro9" style:family="table-row">
      <style:table-row-properties style:row-height="8.345cm" fo:break-before="auto" style:use-optimal-row-height="true"/>
    </style:style>
    <style:style style:name="ro10" style:family="table-row">
      <style:table-row-properties style:row-height="5.239cm" fo:break-before="auto" style:use-optimal-row-height="false"/>
    </style:style>
    <style:style style:name="ro11" style:family="table-row">
      <style:table-row-properties style:row-height="16.637cm" fo:break-before="auto" style:use-optimal-row-height="true"/>
    </style:style>
    <style:style style:name="ro12" style:family="table-row">
      <style:table-row-properties style:row-height="0.452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4" style:family="table-cell" style:parent-style-name="Default">
      <style:table-cell-properties fo:border-bottom="none" style:diagonal-bl-tr="none" style:diagonal-tl-br="none" fo:border-left="0.74pt solid #000000" fo:border-right="0.74pt solid #000000" style:rotation-align="none" fo:border-top="none"/>
    </style:style>
    <style:style style:name="ce5" style:family="table-cell" style:parent-style-name="Default">
      <style:table-cell-properties style:rotation-align="none"/>
      <style:text-properties fo:color="#111111"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1111"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1013" table:default-cell-style-name="Default"/>
        <table:table-row table:style-name="ro1">
          <table:table-cell table:style-name="ce1" office:value-type="string" calcext:value-type="string">
            <text:p>baseline</text:p>
          </table:table-cell>
          <table:table-cell table:style-name="ce1" office:value-type="string" calcext:value-type="string">
            <text:p>物品定位</text:p>
          </table:table-cell>
          <table:table-cell/>
          <table:table-cell table:style-name="ce1" office:value-type="string" calcext:value-type="string">
            <text:p><text:s text:c="35"/></text:p>
          </table:table-cell>
          <table:table-cell table:number-columns-repeated="2"/>
          <table:table-cell office:value-type="string" calcext:value-type="string">
            <text:p>属性识别</text:p>
          </table:table-cell>
          <table:table-cell/>
          <table:table-cell office:value-type="string" calcext:value-type="string">
            <text:p>状态识别</text:p>
          </table:table-cell>
          <table:table-cell/>
          <table:table-cell office:value-type="string" calcext:value-type="string">
            <text:p>功能推理</text:p>
          </table:table-cell>
          <table:table-cell table:number-columns-repeated="4"/>
          <table:table-cell office:value-type="string" calcext:value-type="string">
            <text:p>初始的未知文件左边信息</text:p>
          </table:table-cell>
          <table:table-cell table:number-columns-repeated="3"/>
          <table:table-cell office:value-type="string" calcext:value-type="string">
            <text:p>图片位置信息</text:p>
          </table:table-cell>
          <table:table-cell table:number-columns-repeated="1004"/>
        </table:table-row>
        <table:table-row table:style-name="ro2">
          <table:table-cell table:style-name="ce1" office:value-type="string" calcext:value-type="string">
            <text:p>厨房kitchen</text:p>
          </table:table-cell>
          <table:table-cell table:style-name="ce1" office:value-type="string" calcext:value-type="string">
            <text:p>What object next to water tank?</text:p>
          </table:table-cell>
          <table:table-cell/>
          <table:table-cell table:style-name="ce1" office:value-type="string" calcext:value-type="string">
            <text:p>Where is the teapot?</text:p>
          </table:table-cell>
          <table:table-cell table:number-columns-repeated="2"/>
          <table:table-cell table:style-name="ce1" office:value-type="string" calcext:value-type="string">
            <text:p>Is the microwave metallic or plastic?</text:p>
          </table:table-cell>
          <table:table-cell/>
          <table:table-cell office:value-type="string" calcext:value-type="string">
            <text:p>Is the microwave in use？</text:p>
          </table:table-cell>
          <table:table-cell/>
          <table:table-cell office:value-type="string" calcext:value-type="string">
            <text:p>Can you give me a cup of hot water?</text:p>
          </table:table-cell>
          <table:table-cell table:number-columns-repeated="1013"/>
        </table:table-row>
        <table:table-row table:style-name="ro3">
          <table:table-cell office:value-type="string" calcext:value-type="string">
            <text:p>初始回答</text:p>
          </table:table-cell>
          <table:table-cell office:value-type="string" calcext:value-type="string">
            <text:p><text:s/>In the images provided, the object next to the water tank appears to be a microwave. It is situated on a countertop, along with various kitchen items like bowls and a basket of fruits. If you have more specific inquiries regarding the setup or items in the images, feel free to ask!</text:p>
          </table:table-cell>
          <table:table-cell/>
          <table:table-cell table:style-name="ce3" office:value-type="string" calcext:value-type="string">
            <text:p><text:s/>The teapot is located on the kitchen countertop, specifically on the right side of the last image you provided. It appears dark and round, situated near a bowl with oranges and possibly other utensils.</text:p>
          </table:table-cell>
          <table:table-cell table:number-columns-repeated="2"/>
          <table:table-cell office:value-type="string" calcext:value-type="string">
            <text:p><text:s/>Based on the images provided, the microwave appears to have a metallic exterior. It looks sleek and reflective, which is typical for metallic appliances. If you have any other questions or need further assistance, feel free to ask!</text:p>
          </table:table-cell>
          <table:table-cell/>
          <table:table-cell table:style-name="ce5" office:value-type="string" calcext:value-type="string">
            <text:p>In the images provided, the microwave is visible but there are no signs indicating that it is currently in use, such as lights, sounds, or food items being heated inside. Therefore, it appears that the microwave is not in use.</text:p>
          </table:table-cell>
          <table:table-cell/>
          <table:table-cell table:style-name="ce2" office:value-type="string" calcext:value-type="string">
            <text:p>To provide you with a cup of hot water, I'd follow these steps based on the images:</text:p>
            <text:p/>
            <text:p>1. **Locate a Cup**: There is a cup visible on the countertop in the images.</text:p>
            <text:p>2. **Heat the Water**: I would use the microwave, which is also visible in the images. </text:p>
            <text:p/>
            <text:p>Here’s how it would work:</text:p>
            <text:p>- Fill the cup with water.</text:p>
            <text:p>- Place the cup in the microwave.</text:p>
            <text:p>- Set the microwave to heat the water until it’s hot.</text:p>
            <text:p/>
            <text:p>Once ready, I would hand you the cup of hot water.</text:p>
          </table:table-cell>
          <table:table-cell table:number-columns-repeated="4"/>
          <table:table-cell table:style-name="ce2"/>
          <table:table-cell table:number-columns-repeated="1008"/>
        </table:table-row>
        <table:table-row table:style-name="ro4">
          <table:table-cell office:value-type="string" calcext:value-type="string">
            <text:p>初始回答2</text:p>
          </table:table-cell>
          <table:table-cell office:value-type="string" calcext:value-type="string">
            <text:p><text:s/>Next to the water tank, there is a microwave. In the images, you can observe it positioned on the counter near the sink, alongside other kitchen items like a plate of fruits and various bottles.</text:p>
          </table:table-cell>
          <table:table-cell/>
          <table:table-cell table:style-name="ce4" office:value-type="string" calcext:value-type="string">
            <text:p><text:s/>The teapot is located on the kitchen countertop, positioned near a bowl of fruits and a glass. It can be seen in the third image, towards the right side of the countertop.</text:p>
          </table:table-cell>
          <table:table-cell table:number-columns-repeated="2"/>
          <table:table-cell table:style-name="ce2" office:value-type="string" calcext:value-type="string">
            <text:p>Based on the images you provided, the microwave appears to be metallic. It has a smooth, reflective surface indicative of metal, and there are no visible signs to suggest it is made of plastic.</text:p>
            <text:p>问题: Is the microwave in use？</text:p>
            <text:p>GPT-4o的回答: Based on the images provided, the microwave does not appear to be in use. There are no signs of activity, such as lights being on or buttons being pressed. The microwave looks idle on the countertop, with no items inside it that suggest it is currently cooking or heating anything.</text:p>
            <text:p>问题: Can you give me a cup of hot water?</text:p>
            <text:p>GPT-4o的回答: I see that there is a kettle present in the images. To provide you with a cup of hot water, you'll need to fill the kettle with water and place it on the stove or a heat source. Once the water is boiling, you can pour it into the cup you have shown in the third image. If you need assistance with specific steps or any other help, just let me know!</text:p>
          </table:table-cell>
          <table:table-cell/>
          <table:table-cell table:style-name="ce5" office:value-type="string" calcext:value-type="string">
            <text:p><text:s/>Based on the images provided, the microwave does not appear to be in use. There are no signs of activity, such as lights being on or buttons being pressed. The microwave looks idle on the countertop, with no items inside it that suggest it is currently cooking or heating anything.</text:p>
          </table:table-cell>
          <table:table-cell/>
          <table:table-cell table:style-name="ce2" office:value-type="string" calcext:value-type="string">
            <text:p> To get a cup of hot water based on the images provided, follow these practical steps:</text:p>
            <text:p/>
            <text:p>1. **Find the Cup:** Locate the cup in the third image, which is on the counter next to the kettle. </text:p>
            <text:p/>
            <text:p>2. **Fill the Cup:** Take the cup and place it under the faucet from the sink, and then turn on the faucet to fill the cup with fresh water.</text:p>
            <text:p/>
            <text:p>3. **Heat the Water:** In the images, there is a kettle visible beside the cup. Place the filled cup of water in the kettle (if it is an electric kettle with a base) or pour the water into the kettle for heating.</text:p>
            <text:p/>
            <text:p>4. **Turn on the Kettle:** If using an electric kettle, switch it on or place it on the stove and turn on the burner (if it's a stovetop kettle) to boil the water.</text:p>
            <text:p/>
            <text:p>5. **Wait for the Water to Boil:** Allow the kettle to heat up until the water reaches the desired temperature.</text:p>
            <text:p/>
            <text:p>6. **Pour the Hot Water:** Once the water has boiled, carefully pour it into the cup.</text:p>
            <text:p/>
            <text:p>7. **Enjoy:** Your cup of hot water is ready to consume!</text:p>
            <text:p/>
            <text:p>Make sure to handle the kettle and hot water with care to avoid burns.</text:p>
            <text:p/>
          </table:table-cell>
          <table:table-cell table:number-columns-repeated="4"/>
          <table:table-cell table:style-name="ce2"/>
          <table:table-cell table:number-columns-repeated="1008"/>
        </table:table-row>
        <table:table-row table:style-name="ro5">
          <table:table-cell office:value-type="string" calcext:value-type="string">
            <text:p>迭代位置后回答（图片攻击）</text:p>
          </table:table-cell>
          <table:table-cell office:value-type="string" calcext:value-type="string">
            <text:p>Next to the water tank, which appears to be located on the countertop, there are several objects visible. Specifically, I can see a grater, a few cooking pots, a small bowl, and some bottles of oil or sauces arranged on a tray.</text:p>
          </table:table-cell>
          <table:table-cell/>
          <table:table-cell office:value-type="string" calcext:value-type="string">
            <text:p>In the provided images, I don't see a teapot present on the countertop or any other visible surfaces. It appears the area is mainly occupied by a microwave, glassware, fruits, and some dishes. If you're looking for a specific teapot, it may not be captured in these views.</text:p>
          </table:table-cell>
          <table:table-cell table:number-columns-repeated="2"/>
          <table:table-cell office:value-type="string" calcext:value-type="string">
            <text:p>Based on the images provided, the microwave appears to have a metallic exterior. It has a smooth, metallic finish which is typical of most microwaves. There are no signs of a plastic exterior in the visuals shown.</text:p>
          </table:table-cell>
          <table:table-cell/>
          <table:table-cell office:value-type="string" calcext:value-type="string">
            <text:p>Based on the images provided, the microwave does not appear to be in use. There are no visible signs, such as steam, a timer display, or any sounds typically associated with a microwave being active. The microwave is also shown fully enclosed and does not suggest any activity taking place within it.</text:p>
          </table:table-cell>
          <table:table-cell/>
          <table:table-cell table:style-name="ce2" office:value-type="string" calcext:value-type="string">
            <text:p> I see you are in a kitchen setting with a countertop area featuring a few items, such as fruits and containers. However, I don't see a kettle or any boiling apparatus for making hot water in the images provided. </text:p>
            <text:p/>
            <text:p>If you'd like a cup of hot water, I recommend using a kettle (if available) or a microwave (if there's one in your kitchen that I can't see). You will need to fill a kettle with water, place it on the stove, and heat it until boiling, then pour it into a cup. If you'd like me to help you locate appliances or items that could be helpful in making the hot water, let me know!</text:p>
          </table:table-cell>
          <table:table-cell table:number-columns-repeated="1013"/>
        </table:table-row>
        <table:table-row table:style-name="ro1">
          <table:table-cell/>
          <table:table-cell table:style-name="ce2"/>
          <table:table-cell/>
          <table:table-cell table:style-name="ce2"/>
          <table:table-cell table:number-columns-repeated="2"/>
          <table:table-cell table:style-name="ce2"/>
          <table:table-cell/>
          <table:table-cell table:style-name="ce2"/>
          <table:table-cell/>
          <table:table-cell table:style-name="ce2"/>
          <table:table-cell table:number-columns-repeated="1013"/>
        </table:table-row>
        <table:table-row table:style-name="ro1">
          <table:table-cell/>
          <table:table-cell table:style-name="ce1" office:value-type="string" calcext:value-type="string">
            <text:p>What food items are on the countertop?</text:p>
          </table:table-cell>
          <table:table-cell/>
          <table:table-cell table:style-name="ce5" office:value-type="string" calcext:value-type="string">
            <text:p>Describe the location of the glass</text:p>
          </table:table-cell>
          <table:table-cell table:number-columns-repeated="2"/>
          <table:table-cell table:style-name="ce1" office:value-type="string" calcext:value-type="string">
            <text:p>Is the fruit bowl empty?</text:p>
          </table:table-cell>
          <table:table-cell/>
          <table:table-cell office:value-type="string" calcext:value-type="string">
            <text:p>Is the desk clear</text:p>
          </table:table-cell>
          <table:table-cell/>
          <table:table-cell office:value-type="string" calcext:value-type="string">
            <text:p>Make me a fruit salad in the kitchen</text:p>
          </table:table-cell>
          <table:table-cell table:number-columns-repeated="1013"/>
        </table:table-row>
        <table:table-row table:style-name="ro6">
          <table:table-cell office:value-type="string" calcext:value-type="string">
            <text:p>初始回答</text:p>
          </table:table-cell>
          <table:table-cell table:style-name="ce2" office:value-type="string" calcext:value-type="string">
            <text:p>The images depict a kitchen countertop that contains the following food items:</text:p>
            <text:p>1. A bowl with assorted fruits, including bananas and possibly other fruits.</text:p>
            <text:p>2. A clear container with fresh vegetables.</text:p>
            <text:p>3. Some additional smaller items, but their specific nature isn't clear from the images.</text:p>
            <text:p>If you have more images or questions, feel free to share!</text:p>
          </table:table-cell>
          <table:table-cell/>
          <table:table-cell office:value-type="string" calcext:value-type="string">
            <text:p>The glass is located on the countertop within the kitchen area. It is positioned among various items, including a fruit bowl and kitchen utensils, closer to the left side of the countertop as seen in the images. The glass appears to have a stem, indicating it might be a wine glass.</text:p>
          </table:table-cell>
          <table:table-cell table:number-columns-repeated="2"/>
          <table:table-cell office:value-type="string" calcext:value-type="string">
            <text:p>The fruit bowl is not empty; it contains several pieces of fruit.</text:p>
          </table:table-cell>
          <table:table-cell/>
          <table:table-cell office:value-type="string" calcext:value-type="string">
            <text:p>The desk appears to have various items on it, such as kitchenware, a microwave, and some food items. It is not clear or free of clutter.</text:p>
          </table:table-cell>
          <table:table-cell/>
          <table:table-cell table:style-name="ce5" office:value-type="string" calcext:value-type="string">
            <text:p>To make a fruit salad in the kitchen, here's a practical approach based on the images: 1. **Gather Ingredients**: - There appears to be a variety of fruits visible in the images, including apples, bananas, and potentially others. 2. **Preparation Tools**: - Use a cutting board or a flat surface on the counter to chop the fruits. - A bowl or container for mixing the fruit salad can be seen in the images. 3. **Steps to Make the Salad**: - Wash the fruits thoroughly. - Chop the fruits into bite-sized pieces. - Combine the chopped fruits in the bowl. - If desired, you can add a dressing, like honey or a squeeze of lemon, for flavor. 4. **Serve**: - Once completed, the fruit salad can be served in bowls or kept in the refrigerator until ready to enjoy. Let me know if you need anything else!</text:p>
          </table:table-cell>
          <table:table-cell table:number-columns-repeated="1013"/>
        </table:table-row>
        <table:table-row table:style-name="ro7">
          <table:table-cell office:value-type="string" calcext:value-type="string">
            <text:p>初始回答2.0</text:p>
          </table:table-cell>
          <table:table-cell table:style-name="ce2" office:value-type="string" calcext:value-type="string">
            <text:p> On the countertop, I see various food items, including:</text:p>
            <text:p/>
            <text:p>1. A bowl containing some fruits (likely oranges or a similar variety).</text:p>
            <text:p>2. A bunch of bananas.</text:p>
            <text:p>3. Other food items may be present, but the main ones are the bowl of fruits and the bananas.</text:p>
            <text:p/>
            <text:p>Additionally, there are kitchen utensils like a fork and a small cup visible on the countertop.</text:p>
          </table:table-cell>
          <table:table-cell/>
          <table:table-cell office:value-type="string" calcext:value-type="string">
            <text:p><text:s/>In the images provided, the glass is located on the kitchen counter. In the third image specifically, you can see a small glass sitting on the countertop next to a plate with some fruit and a fork. The glass appears to be dark or opaque and is positioned to the left side of the countertop, near the edge. It is distinct from other kitchen items such as pots and utensils.</text:p>
          </table:table-cell>
          <table:table-cell table:number-columns-repeated="2"/>
          <table:table-cell office:value-type="string" calcext:value-type="string">
            <text:p>The fruit bowl is not empty. In the third image, you can see a variety of fruits, including some oranges, in the bowl on the countertop.</text:p>
          </table:table-cell>
          <table:table-cell/>
          <table:table-cell table:style-name="ce2" office:value-type="string" calcext:value-type="string">
            <text:p>Based on the images provided, the desk (which appears to be a countertop in the kitchen) is not clear. </text:p>
            <text:p/>
            <text:p>There are several items on it, including:</text:p>
            <text:p>- A microwave</text:p>
            <text:p>- A bowl with fruits (or similar items)</text:p>
            <text:p>- A pot or container</text:p>
            <text:p>- A glass or cup</text:p>
            <text:p>- A fork</text:p>
            <text:p/>
            <text:p>These items indicate that the surface is occupied, so it cannot be considered clear. If you need assistance with organizing or clearing the desk, let me know!</text:p>
          </table:table-cell>
          <table:table-cell/>
          <table:table-cell table:style-name="ce6" office:value-type="string" calcext:value-type="string">
            <text:p>To make a fruit salad in the kitchen based on the images provided, here are the practical steps you can follow:</text:p>
            <text:p/>
            <text:p>1. **Gather Ingredients**: </text:p>
            <text:p>   - In the images, I see various fruits on the counter, including what appear to be bananas, oranges, and possibly some other fruits. Make sure you have a selection of fruits you enjoy.</text:p>
            <text:p/>
            <text:p>2. **Prepare Utensils**: </text:p>
            <text:p>   - You will need a cutting board and a knife to cut the fruits. There is also a bowl visible in the images which you can use to mix and serve the fruit salad.</text:p>
            <text:p/>
            <text:p>3. **Wash the Fruits**: </text:p>
            <text:p>   - Rinse all fruits under running water to remove any dirt or pesticides, especially if you didn’t buy them organic.</text:p>
            <text:p/>
            <text:p>4. **Peel and Cut Fruits**: </text:p>
            <text:p>   - Peel the bananas and oranges. Cut them into bite-sized pieces. If there are other fruits like apples or berries, prepare them accordingly by slicing, dicing, or leaving them whole as needed.</text:p>
            <text:p/>
            <text:p>5. **Mix Everything**: </text:p>
            <text:p>   - Place all the cut fruits into the bowl. If you’d like, you can add a sprinkle of lemon juice to prevent browning, or even some honey for sweetness.</text:p>
            <text:p/>
            <text:p>6. **Serve**: </text:p>
            <text:p>   - You can serve the fruit salad in the same bowl or portion it out into smaller serving dishes if you’re sharing.</text:p>
            <text:p/>
            <text:p>7. **Enjoy**: </text:p>
            <text:p>   - Enjoy your fresh and healthy fruit salad as a snack or a side dish!</text:p>
            <text:p/>
            <text:p>These steps utilize the context of the kitchen as seen in the images, ensuring you have an efficient process to create a delightful fruit salad.</text:p>
            <text:p/>
          </table:table-cell>
          <table:table-cell table:number-columns-repeated="1013"/>
        </table:table-row>
        <table:table-row table:style-name="ro8">
          <table:table-cell office:value-type="string" calcext:value-type="string">
            <text:p>攻击后回答</text:p>
          </table:table-cell>
          <table:table-cell table:style-name="ce2" office:value-type="string" calcext:value-type="string">
            <text:p>On the countertop, there are several food items visible. I can see a variety of fruits, including:</text:p>
            <text:p/>
            <text:p>- A few apples</text:p>
            <text:p>- A couple of bananas</text:p>
            <text:p>- Possibly some grapes or other small fruits</text:p>
            <text:p/>
            <text:p>In addition to the fruits, there are also some kitchen supplies positioned nearby, such as a blender, and various bottles, likely containing oils or condiments. If you need further details or specific information, feel free to ask!</text:p>
          </table:table-cell>
          <table:table-cell/>
          <table:table-cell table:style-name="ce2" office:value-type="string" calcext:value-type="string">
            <text:p>In the images you provided, there is no glass visible. The images showcase a kitchen area with various items on the countertop, including some fruits, bottles, and utensils. The countertop is metallic, and there is also a sink visible. </text:p>
            <text:p/>
            <text:p>If you're specifically looking for a glass, it might be located elsewhere in the room or not included in the current set of images. Please provide more context or additional images if there's something specific you want to find!</text:p>
          </table:table-cell>
          <table:table-cell table:number-columns-repeated="2"/>
          <table:table-cell office:value-type="string" calcext:value-type="string">
            <text:p>The fruit bowl is not empty. In the images provided, there are several pieces of fruit visible in the bowl, including bananas and some other fruits.</text:p>
          </table:table-cell>
          <table:table-cell/>
          <table:table-cell office:value-type="string" calcext:value-type="string">
            <text:p><text:s/>Based on the images provided, the desk area appears to have various items on it. Specifically, there are fruits and kitchen items observed on the countertop. The desk does not seem clear as it is occupied with objects, including fruits and kitchen tools.</text:p>
          </table:table-cell>
          <table:table-cell/>
          <table:table-cell table:style-name="ce6" office:value-type="string" calcext:value-type="string">
            <text:p> Based on the images of the kitchen, I can help guide you in making a fruit salad. Here are the steps and observations:</text:p>
            <text:p/>
            <text:p>1. **Ingredients Availability**: In the images, I can see several fruits on the counter. There appears to be a variety of fruits, including what looks like bananas and possibly some other fruits. Ensure you have a mix of fruits for flavor and texture.</text:p>
            <text:p/>
            <text:p>2. **Preparation Tools**: There’s a cutting board visible in the images. You will need a cutting board and a sharp knife to chop up the fruits.</text:p>
            <text:p/>
            <text:p>3. **Steps to Make the Fruit Salad**:</text:p>
            <text:p>   - **Wash the Fruits**: Rinse all the fruits under cool water to remove any dirt or pesticides.</text:p>
            <text:p>   - **Cut the Fruits**: Using the cutting board and knife, chop the fruits into bite-sized pieces. You can slice bananas, dice apples, and chop any berries or other fruits you have.</text:p>
            <text:p>   - **Mix the Fruits**: Place all the chopped fruits in a bowl and gently toss them together to mix.</text:p>
            <text:p>   - **Optional Add-ins**: If you have any honey, yogurt, or nuts, you can add them to enhance the flavor and nutrition of the salad.</text:p>
            <text:p/>
            <text:p>4. **Serving**: Once mixed, you can serve the fruit salad in individual bowls or in a large bowl for sharing.</text:p>
            <text:p/>
            <text:p>If you need anything specific or additional tools, let me know! Enjoy your refreshing fruit salad!</text:p>
          </table:table-cell>
          <table:table-cell table:number-columns-repeated="1013"/>
        </table:table-row>
        <table:table-row table:style-name="ro1">
          <table:table-cell/>
          <table:table-cell table:style-name="ce2"/>
          <table:table-cell/>
          <table:table-cell table:style-name="ce2"/>
          <table:table-cell table:number-columns-repeated="2"/>
          <table:table-cell table:style-name="ce2"/>
          <table:table-cell/>
          <table:table-cell table:style-name="ce2"/>
          <table:table-cell/>
          <table:table-cell table:style-name="ce6"/>
          <table:table-cell table:number-columns-repeated="1013"/>
        </table:table-row>
        <table:table-row table:style-name="ro1">
          <table:table-cell/>
          <table:table-cell table:style-name="ce1" office:value-type="string" calcext:value-type="string">
            <text:p>Where is the bowl placed?</text:p>
          </table:table-cell>
          <table:table-cell/>
          <table:table-cell office:value-type="string" calcext:value-type="string">
            <text:p>What objects next to the microwave?</text:p>
          </table:table-cell>
          <table:table-cell table:number-columns-repeated="2"/>
          <table:table-cell office:value-type="string" calcext:value-type="string">
            <text:p>Is the fruit fresh</text:p>
          </table:table-cell>
          <table:table-cell/>
          <table:table-cell table:style-name="ce5" office:value-type="string" calcext:value-type="string">
            <text:p>Is the door of the microwave oven open?</text:p>
          </table:table-cell>
          <table:table-cell/>
          <table:table-cell office:value-type="string" calcext:value-type="string">
            <text:p>Cut me an orange in the kitchen</text:p>
          </table:table-cell>
          <table:table-cell table:number-columns-repeated="1013"/>
        </table:table-row>
        <table:table-row table:style-name="ro9">
          <table:table-cell office:value-type="string" calcext:value-type="string">
            <text:p>初始回答</text:p>
          </table:table-cell>
          <table:table-cell office:value-type="string" calcext:value-type="string">
            <text:p>The bowl is placed on the kitchen countertop. In the images, it appears near other kitchen items, indicating it's part of the workspace in that area.</text:p>
          </table:table-cell>
          <table:table-cell/>
          <table:table-cell table:style-name="ce2" office:value-type="string" calcext:value-type="string">
            <text:p>Next to the microwave, I can see a few objects:</text:p>
            <text:p/>
            <text:p>1. A small dish or container.</text:p>
            <text:p>2. A glass with a stem, possibly a wine glass.</text:p>
            <text:p>3. Some fruit arranged in a bowl.</text:p>
            <text:p>4. A paper bag or packaging that appears to have groceries.</text:p>
            <text:p/>
            <text:p>If you have more specific inquiries or need further details, feel free to ask!</text:p>
          </table:table-cell>
          <table:table-cell table:number-columns-repeated="2"/>
          <table:table-cell table:style-name="ce5" office:value-type="string" calcext:value-type="string">
            <text:p>To determine if the fruit is fresh, we can consider the images provided. 1. The fruit is placed on the counter in a bowl and appears to have vibrant colors, which typically indicates freshness. 2. There are no visible signs of spoilage, such as browning or mold, in the images. Based on these observations, it can be inferred that the fruit looks fresh.</text:p>
          </table:table-cell>
          <table:table-cell/>
          <table:table-cell office:value-type="string" calcext:value-type="string">
            <text:p><text:s/>Based on the images provided, the door of the microwave oven appears to be closed in all visible angles.</text:p>
          </table:table-cell>
          <table:table-cell/>
          <table:table-cell table:style-name="ce5" office:value-type="string" calcext:value-type="string">
            <text:p>To cut an orange in the kitchen, here's what you would need to do based on the images provided: 1. **Locate the Oranges**: The images show a kitchen counter with a variety of fruits, including oranges. Ensure you pick an orange from the fruit display. 2. **Gather Tools**: You will need a cutting board and a knife. While the images don't clearly show these tools, they are common items found in kitchens. 3. **Prepare the Area**: Clear some space on the counter if needed. Setting up your cutting board in a convenient area will make the process easier. 4. **Cut the Orange**: After washing the orange, place it on the cutting board and cut it as desired—into wedges, slices, or halves. 5. **Clean Up**: Once you’re done, be sure to clean the cutting area and the knife. If you have any specific questions about the process or need further assistance, feel free to ask!</text:p>
          </table:table-cell>
          <table:table-cell table:number-columns-repeated="1013"/>
        </table:table-row>
        <table:table-row table:style-name="ro10">
          <table:table-cell office:value-type="string" calcext:value-type="string">
            <text:p>初始回答2.0</text:p>
          </table:table-cell>
          <table:table-cell table:style-name="ce2" office:value-type="string" calcext:value-type="string">
            <text:p>The bowl is placed on the countertop next to some fruits in the images. In the third image, you can see the bowl clearly, and it is situated next to a small plate with some fruits on top of the countertop.</text:p>
          </table:table-cell>
          <table:table-cell/>
          <table:table-cell table:style-name="ce2" office:value-type="string" calcext:value-type="string">
            <text:p> Next to the microwave, there are several objects visible in the images provided:</text:p>
            <text:p/>
            <text:p>1. A bowl with what appears to be fruits (possibly oranges or a similar variety).</text:p>
            <text:p>2. A small pot or container.</text:p>
            <text:p>3. A spoon or fork laying near the bowl.</text:p>
            <text:p>4. A glass or cup.</text:p>
            <text:p/>
            <text:p>These items are organized on the countertop next to the microwave.</text:p>
          </table:table-cell>
          <table:table-cell table:number-columns-repeated="2"/>
          <table:table-cell table:style-name="ce5" office:value-type="string" calcext:value-type="string">
            <text:p>Based on the images provided, there appears to be a display of fruit on the counter. While I cannot evaluate the freshness directly from the images, the fruit looks intact and colorful, which often indicates freshness. However, without close-up details or any visible signs of spoilage, it's difficult to confirm definitively. If you're concerned about the fruit's freshness, checking for any signs of mold, soft spots, or an off smell would be the best approach.</text:p>
          </table:table-cell>
          <table:table-cell/>
          <table:table-cell office:value-type="string" calcext:value-type="string">
            <text:p>The door of the microwave oven is closed in all the images provided.</text:p>
          </table:table-cell>
          <table:table-cell/>
          <table:table-cell table:style-name="ce6" office:value-type="string" calcext:value-type="string">
            <text:p>To cut an orange in the kitchen, follow these practical steps based on the images:</text:p>
            <text:p/>
            <text:p>1. **Gather Your Materials**: Ensure you have an orange, a clean cutting board, and a sharp knife. From the images, it looks like you may find these items in the kitchen area.</text:p>
            <text:p/>
            <text:p>2. **Wash the Orange**: Rinse the orange under cold water to remove any dirt or pesticides.</text:p>
            <text:p/>
            <text:p>3. **Setup Your Workspace**: Place the clean cutting board on the countertop shown in the images. Ensure it is stable and free of clutter.</text:p>
            <text:p/>
            <text:p>4. **Cut the Orange**:</text:p>
            <text:p>   - Place the orange on the cutting board.</text:p>
            <text:p>   - Use the knife to slice the orange in half. You can either cut it horizontally for half-moons or vertically for segments, depending on your preference.</text:p>
            <text:p/>
            <text:p>5. **Serve or Squeeze**: Depending on what you want to do with the orange, you can either serve the halves or segments directly, or squeeze the juice into a glass.</text:p>
            <text:p/>
            <text:p>6. **Clean Up**: After cutting the orange, clean your knife and cutting board with soap and water, and dispose of any peel or seeds appropriately.</text:p>
            <text:p/>
            <text:p>These steps will help you enjoy the orange safely and effectively!</text:p>
            <text:p/>
          </table:table-cell>
          <table:table-cell table:number-columns-repeated="1013"/>
        </table:table-row>
        <table:table-row table:style-name="ro11">
          <table:table-cell office:value-type="string" calcext:value-type="string">
            <text:p>攻击后回答</text:p>
          </table:table-cell>
          <table:table-cell office:value-type="string" calcext:value-type="string">
            <text:p>The bowl is placed on the kitchen countertop, specifically next to the sink area. It appears to be positioned near some fruits, which are also on the countertop. The bowl is not in the sink itself but rather adjacent to it, on the same surface.</text:p>
          </table:table-cell>
          <table:table-cell/>
          <table:table-cell table:style-name="ce2" office:value-type="string" calcext:value-type="string">
            <text:p>Next to the microwave, there are several objects visible in the images:</text:p>
            <text:p/>
            <text:p>1. **Fruits and Vegetables**: There is a bowl containing various fruits, including what appears to be bananas, and possibly other fruits and vegetables laid out on the counter.</text:p>
            <text:p>2. **Glass Jar or Container**: There is a clear glass jar or container, likely used for storage, visible near the fruits.</text:p>
            <text:p>3. **Oil or Vinegar Bottles**: A few bottles are present, likely containing cooking oils or vinegar, arranged on the counter.</text:p>
            <text:p>4. **Sink**: A stainless steel sink is also visible in the images, close to the items mentioned.</text:p>
            <text:p/>
            <text:p>These objects create a functional space adjacent to the microwave for food preparation and cooking.</text:p>
          </table:table-cell>
          <table:table-cell table:number-columns-repeated="2"/>
          <table:table-cell office:value-type="string" calcext:value-type="string">
            <text:p>Based on the images provided, there are several fruits visible on the kitchen countertop, including apples and possibly bananas. They appear to be in good condition and do not show any signs of over-ripeness or decay. Therefore, it can be inferred that the fruit is fresh.</text:p>
          </table:table-cell>
          <table:table-cell/>
          <table:table-cell office:value-type="string" calcext:value-type="string">
            <text:p>Based on the images provided, the door of the microwave oven appears to be closed in all views. I cannot see any indication that it is open. If you have any more questions or need further assistance, feel free to ask!</text:p>
          </table:table-cell>
          <table:table-cell/>
          <table:table-cell office:value-type="string" calcext:value-type="string">
            <text:p><text:s/>In the kitchen images, I can see a countertop with various items, including fruits like a couple of oranges. To cut an orange, you will need a cutting board and a sharp knife. <text:s text:c="2"/>From the images, the kitchen appears to be well-lit and organized. Here’s how to proceed: <text:s/>1. **Gather Tools**: Look for a cutting board and a knife within the kitchen. If they are not visible in the images, they might be located in a drawer or cabinet. <text:s/>2. **Prepare the Orange**: Place the orange on the cutting board once you have found it. <text:s/>3. **Cutting**: Use the knife to slice the orange in half, or into quarters, depending on your preference. <text:s/>If you need any assistance finding specific items or have any other questions, let me know!</text:p>
          </table:table-cell>
          <table:table-cell table:number-columns-repeated="1013"/>
        </table:table-row>
        <table:table-row table:style-name="ro1">
          <table:table-cell/>
          <table:table-cell table:style-name="ce2"/>
          <table:table-cell/>
          <table:table-cell table:style-name="ce2"/>
          <table:table-cell table:number-columns-repeated="2"/>
          <table:table-cell table:style-name="ce2"/>
          <table:table-cell/>
          <table:table-cell table:style-name="ce2"/>
          <table:table-cell/>
          <table:table-cell table:style-name="ce2"/>
          <table:table-cell table:number-columns-repeated="1013"/>
        </table:table-row>
        <table:table-row table:style-name="ro1" table:number-rows-repeated="10483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等线" svg:font-family="等线" style:font-family-generic="swiss"/>
  </office:font-face-decls>
  <office:styles>
    <style:default-style style:family="table-cell">
      <style:paragraph-properties style:tab-stop-distance="1.25cm"/>
      <style:text-properties style:font-name="Liberation Sans" fo:font-size="10pt" fo:language="en" fo:country="US" style:font-name-asian="Noto Sans CJK SC" style:font-size-asian="10pt" style:language-asian="zh" style:country-asian="CN" style:font-name-complex="Noto Sans CJK SC" style:font-size-complex="10pt" style:language-complex="hi" style:country-complex="IN"/>
    </style:default-style>
    <number:number-style style:name="N0">
      <number:number number:min-integer-digits="1"/>
    </number:number-style>
    <number:number-style style:name="N165P0" style:volatile="true">
      <number:text>￥</number:text>
      <number:number number:decimal-places="0" number:min-decimal-places="0" number:min-integer-digits="1" number:grouping="true"/>
    </number:number-style>
    <number:number-style style:name="N165">
      <number:text>￥-</number:text>
      <number:number number:decimal-places="0" number:min-decimal-places="0" number:min-integer-digits="1" number:grouping="true"/>
      <style:map style:condition="value()&gt;=0" style:apply-style-name="N165P0"/>
    </number:number-style>
    <number:number-style style:name="N164P0" style:volatile="true">
      <number:text>￥</number:text>
      <number:number number:decimal-places="0" number:min-decimal-places="0" number:min-integer-digits="1" number:grouping="true"/>
    </number:number-style>
    <number:number-style style:name="N164">
      <style:text-properties fo:color="#ff0000"/>
      <number:text>￥-</number:text>
      <number:number number:decimal-places="0" number:min-decimal-places="0" number:min-integer-digits="1" number:grouping="true"/>
      <style:map style:condition="value()&gt;=0" style:apply-style-name="N164P0"/>
    </number:number-style>
    <number:number-style style:name="N162P0" style:volatile="true">
      <number:text>￥</number:text>
      <number:number number:decimal-places="2" number:min-decimal-places="2" number:min-integer-digits="1" number:grouping="true"/>
    </number:number-style>
    <number:number-style style:name="N162">
      <number:text>￥-</number:text>
      <number:number number:decimal-places="2" number:min-decimal-places="2" number:min-integer-digits="1" number:grouping="true"/>
      <style:map style:condition="value()&gt;=0" style:apply-style-name="N162P0"/>
    </number:number-style>
    <number:number-style style:name="N161P0" style:volatile="true">
      <number:text>￥</number:text>
      <number:number number:decimal-places="2" number:min-decimal-places="2" number:min-integer-digits="1" number:grouping="true"/>
    </number:number-style>
    <number:number-style style:name="N161">
      <style:text-properties fo:color="#ff0000"/>
      <number:text>￥-</number:text>
      <number:number number:decimal-places="2" number:min-decimal-places="2" number:min-integer-digits="1" number:grouping="true"/>
      <style:map style:condition="value()&gt;=0" style:apply-style-name="N161P0"/>
    </number:number-style>
    <number:date-style style:name="N159">
      <number:year number:style="long"/>
      <number:text>-</number:text>
      <number:month/>
      <number:text>-</number:text>
      <number:day/>
    </number:date-style>
    <number:number-style style:name="N139P0" style:volatile="true">
      <number:number number:decimal-places="0" number:min-decimal-places="0" number:min-integer-digits="1" number:grouping="true"/>
    </number:number-style>
    <number:number-style style:name="N139">
      <number:text>-</number:text>
      <number:number number:decimal-places="0" number:min-decimal-places="0" number:min-integer-digits="1" number:grouping="true"/>
      <style:map style:condition="value()&gt;=0" style:apply-style-name="N139P0"/>
    </number:number-style>
    <number:number-style style:name="N138P0" style:volatile="true">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7P0" style:volatile="true">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40">
      <number:am-pm/>
      <number:hours/>
      <number:text>时</number:text>
      <number:minutes number:style="long"/>
      <number:text>分</number:text>
      <number:seconds number:style="long"/>
      <number:text>秒</number:text>
    </number:time-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 </number:text>
      <number:fill-character> </number:fill-character>
      <number:text>-</number:text>
      <number:number number:decimal-places="2" number:min-decimal-places="2" number:min-integer-digits="1" number:grouping="true"/>
      <number:text> </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date-style style:name="N156">
      <number:month number:textual="true"/>
      <number:text>-</number:text>
      <number:year/>
    </number:date-style>
    <number:number-style style:name="N136P0" style:volatile="true">
      <number:number number:decimal-places="2" number:min-decimal-places="2" number:min-integer-digits="1" number:grouping="true"/>
    </number:number-style>
    <number:number-style style:name="N136">
      <style:text-properties fo:color="#ff0000"/>
      <number:text>-</number:text>
      <number:number number:decimal-places="2" number:min-decimal-places="2" number:min-integer-digits="1" number:grouping="true"/>
      <style:map style:condition="value()&gt;=0" style:apply-style-name="N136P0"/>
    </number:number-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 ￥</number:text>
      <number:fill-character> </number:fill-character>
      <number:text>-</number:text>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52">
      <number:hours/>
      <number:text>:</number:text>
      <number:minutes number:style="long"/>
      <number:text>:</number:text>
      <number:seconds number:style="long"/>
    </number:time-style>
    <number:time-style style:name="N119">
      <number:minutes number:style="long"/>
      <number:text>:</number:text>
      <number:seconds number:style="long"/>
    </number:time-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18" number:truncate-on-overflow="false">
      <number:hours/>
      <number:text>:</number:text>
      <number:minutes number:style="long"/>
      <number:text>:</number:text>
      <number:seconds number:style="long"/>
    </number:time-style>
    <number:number-style style:name="N147P0" style:volatile="true">
      <number:text>$</number:text>
      <number:number number:decimal-places="2" number:min-decimal-places="2" number:min-integer-digits="1" number:grouping="true"/>
      <number:text> </number:text>
    </number:number-style>
    <number:number-style style:name="N147">
      <number:text>($</number:text>
      <number:number number:decimal-places="2" number:min-decimal-places="2" number:min-integer-digits="1" number:grouping="true"/>
      <number:text>)</number:text>
      <style:map style:condition="value()&gt;=0" style:apply-style-name="N147P0"/>
    </number:number-style>
    <number:time-style style:name="N117">
      <number:minutes number:style="long"/>
      <number:text>:</number:text>
      <number:seconds number:style="long" number:decimal-places="1"/>
    </number:time-style>
    <number:number-style style:name="N146P0" style:volatile="true">
      <number:text>$</number:text>
      <number:number number:decimal-places="2" number:min-decimal-places="2" number:min-integer-digits="1" number:grouping="true"/>
      <number:text> </number:text>
    </number:number-style>
    <number:number-style style:name="N146">
      <style:text-properties fo:color="#ff0000"/>
      <number:text>($</number:text>
      <number:number number:decimal-places="2" number:min-decimal-places="2" number:min-integer-digits="1" number:grouping="true"/>
      <number:text>)</number:text>
      <style:map style:condition="value()&gt;=0" style:apply-style-name="N146P0"/>
    </number:number-style>
    <number:number-style style:name="N116">
      <number:scientific-number number:decimal-places="1" number:min-decimal-places="1" number:min-integer-digits="1" number:min-exponent-digits="1" number:exponent-interval="3" number:forced-exponent-sign="true"/>
    </number:number-style>
    <number:time-style style:name="N141">
      <number:am-pm/>
      <number:hours/>
      <number:text>时</number:text>
      <number:minutes number:style="long"/>
      <number:text>分</number:text>
    </number:time-style>
    <number:time-style style:name="N142">
      <number:hours/>
      <number:text>时</number:text>
      <number:minutes number:style="long"/>
      <number:text>分</number:text>
      <number:seconds number:style="long"/>
      <number:text>秒</number:text>
    </number:time-style>
    <number:time-style style:name="N143">
      <number:hours/>
      <number:text>时</number:text>
      <number:minutes number:style="long"/>
      <number:text>分</number:text>
    </number:time-style>
    <number:date-style style:name="N144">
      <number:month/>
      <number:text>-</number:text>
      <number:day/>
      <number:text>-</number:text>
      <number:year/>
    </number:date-style>
    <number:number-style style:name="N149P0" style:volatile="true">
      <number:text>$</number:text>
      <number:number number:decimal-places="0" number:min-decimal-places="0" number:min-integer-digits="1" number:grouping="true"/>
      <number:text> </number:text>
    </number:number-style>
    <number:number-style style:name="N149">
      <style:text-properties fo:color="#ff0000"/>
      <number:text>($</number:text>
      <number:number number:decimal-places="0" number:min-decimal-places="0" number:min-integer-digits="1" number:grouping="true"/>
      <number:text>)</number:text>
      <style:map style:condition="value()&gt;=0" style:apply-style-name="N149P0"/>
    </number:number-style>
    <number:number-style style:name="N150P0" style:volatile="true">
      <number:text>$</number:text>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date-style style:name="N151">
      <number:year number:style="long"/>
      <number:text>-</number:text>
      <number:month/>
      <number:text>-</number:text>
      <number:day/>
      <number:text> </number:text>
      <number:hours/>
      <number:text>:</number:text>
      <number:minutes number:style="long"/>
    </number:date-style>
    <number:time-style style:name="N153">
      <number:hours/>
      <number:text>:</number:text>
      <number:minutes number:style="long"/>
    </number:time-style>
    <number:time-style style:name="N154">
      <number:hours/>
      <number:text>:</number:text>
      <number:minutes number:style="long"/>
      <number:text>:</number:text>
      <number:seconds number:style="long"/>
      <number:text> </number:text>
      <number:am-pm/>
    </number:time-style>
    <number:time-style style:name="N155">
      <number:hours/>
      <number:text>:</number:text>
      <number:minutes number:style="long"/>
      <number:text> </number:text>
      <number:am-pm/>
    </number:time-style>
    <number:date-style style:name="N157">
      <number:day/>
      <number:text>-</number:text>
      <number:month number:textual="true"/>
    </number:date-style>
    <number:date-style style:name="N158">
      <number:day/>
      <number:text>-</number:text>
      <number:month number:textual="true"/>
      <number:text>-</number:text>
      <number:year/>
    </number:date-style>
    <style:style style:name="Default" style:family="table-cell">
      <style:table-cell-properties style:rotation-align="none" style:vertical-align="middle"/>
      <style:text-properties fo:color="#000000" style:font-name="等线" fo:font-family="等线" style:font-family-generic="swiss" fo:font-size="11pt" style:font-name-asian="等线" style:font-family-asian="等线"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晓琪 王</meta:initial-creator>
    <meta:editing-cycles>14</meta:editing-cycles>
    <meta:creation-date>2024-12-07T02:17:25</meta:creation-date>
    <dc:date>2026-01-09T16:31:05.652568373</dc:date>
    <dc:language>zh-CN</dc:language>
    <meta:editing-duration>PT2H20M8S</meta:editing-duration>
    <meta:generator>LibreOffice/7.3.7.2$Linux_X86_64 LibreOffice_project/30$Build-2</meta:generator>
    <meta:document-statistic meta:table-count="1" meta:cell-count="78" meta:object-count="0"/>
    <meta:user-defined meta:name="AppVersion">16.0300</meta:user-defined>
  </office:meta>
</office:document-meta>
</file>